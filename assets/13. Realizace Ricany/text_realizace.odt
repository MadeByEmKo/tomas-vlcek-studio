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iviaSeznam" svg:font-family="TriviaSeznam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widows="1" fo:text-indent="0cm" style:auto-text-indent="false"/>
    </style:style>
    <style:style style:name="T1" style:family="text">
      <style:text-properties fo:font-variant="normal" fo:text-transform="none" fo:color="#000000" style:font-name="TriviaSeznam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riérové dveře - dub rustikal hnědý /otevíravé a posuvné dveře</text:span><text:line-break/><text:span text:style-name="T1">kuchyně elite - lak lesk  premium magnolie</text:span><text:line-break/><text:span text:style-name="T1">pracovní deska - keramika  Kámen Decor – zajímavý subtilní detail osazení spodního dřezu </text:span><text:line-break/><text:span text:style-name="T1">stul + židle TON - dub přírodní</text:span><text:line-break/><text:span text:style-name="T1">interiérová svítidla - RENDL Light</text:span><text:line-break/><text:span text:style-name="T1">schodiště - samonosné kov antracit + zábradlí sklo + stupně dub moření tmavě hnědé</text:span><text:line-break/><text:span text:style-name="T1">průchodový portál + knihovna a obyvák -  dub rustikal hnědý</text:span><text:line-break/><text:span text:style-name="T1">zádveří - obklad s plně integrovanými otevíravými dveřmi v provedení dub rustikal hnědý + odkládací lavice kombinace dub přírodní</text:span><text:line-break/><text:span text:style-name="T1">koupelnový nábytek - dýha palisander</text:span><text:line-break/><text:span text:style-name="T1">ložnice - postel ELISE + komoda s toaletním odkladem- bílá lak lesk</text:span><text:line-break/><text:span text:style-name="T1">šatna u ložnice - lamino dub přírodní</text:span><text:line-break/><text:span text:style-name="T1">sedačka - pravé peří EDEL</text:span><text:line-break/><text:span text:style-name="T1">pracovna - nefotila se ( lamino antracit + dub nagano )</text:span></text:p>
      <text:p text:style-name="P1"><text:span text:style-name="T1">krb – betonová stěrka</text:span></text:p>
      <text:p text:style-name="P1"><text:span text:style-name="T1">TV panel – LED osvětlení se stmívačem pro vytvořeni atmosféry v pokoji a také pro lepší sledování TV</text:span></text:p>
      <text:p text:style-name="P1"><text:span text:style-name="T1"/></text:p>
      <text:p text:style-name="P1"><text:line-break/>Otevíravé dýhované dveře SPACE</text:p>
      <text:p text:style-name="P1">Posuvné dýhované dveře SPACE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iviaSeznam" svg:font-family="TriviaSeznam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5T11:00:25.25</meta:creation-date>
    <dc:date>2016-03-15T18:55:05.31</dc:date>
    <meta:editing-duration>PT7H54M41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5" meta:word-count="155" meta:character-count="945"/>
  </office:meta>
</office:document-meta>
</file>